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AlunoOnlineApplication - Testes Unitários</text:p>
      <text:p text:style-name="Standard"/>
      <text:p text:style-name="Standard">Este projeto é uma aplicação Spring Boot que contém testes unitários básicos utilizando o JUnit 5. O principal objetivo deste teste é verificar se o contexto da aplicação está sendo carregado corretamente.</text:p>
      <text:p text:style-name="Standard"/>
      <text:p text:style-name="Standard">## Funcionalidade</text:p>
      <text:p text:style-name="Standard"/>
      <text:p text:style-name="Standard">A classe `AlunoOnlineApplicationTests` contém um teste simples que verifica se o contexto da aplicação carrega sem erros. Isso é útil para garantir que a configuração do Spring Boot esteja correta e que todos os beans e dependências necessários estejam sendo carregados adequadamente no contexto da aplicação.</text:p>
      <text:p text:style-name="Standard"/>
      <text:p text:style-name="Standard">O teste é executado pelo método `contextLoads()` e não realiza nenhuma asserção explícita. Ele serve apenas para garantir que o Spring Boot seja capaz de iniciar corretamente o contexto da aplicação durante os testes.</text:p>
      <text:p text:style-name="Standard"/>
      <text:p text:style-name="Standard">## Bibliotecas Usadas</text:p>
      <text:p text:style-name="Standard"/>
      <text:p text:style-name="Standard">- **Spring Boot**: Framework para desenvolvimento de aplicações Java baseadas em Spring, que facilita a configuração e a execução de aplicações empresariais.</text:p>
      <text:p text:style-name="Standard"><text:s text:c="2"/></text:p>
      <text:p text:style-name="Standard">- **JUnit 5**: Framework de testes unitários utilizado para escrever e executar testes no código Java. A versão mais recente do JUnit, com novos recursos e melhorias em relação à versão anterior.</text:p>
      <text:p text:style-name="Standard"/>
      <text:p text:style-name="Standard">- **Spring Boot Test**: Biblioteca do Spring para realizar testes de integração, permitindo que o contexto da aplicação seja carregado de forma completa, simulando um ambiente real de execução.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14:58:41.237317505</meta:creation-date>
    <dc:date>2024-11-26T14:59:04.506136465</dc:date>
    <meta:editing-duration>PT24S</meta:editing-duration>
    <meta:editing-cycles>1</meta:editing-cycles>
    <meta:document-statistic meta:table-count="0" meta:image-count="0" meta:object-count="0" meta:page-count="1" meta:paragraph-count="10" meta:word-count="205" meta:character-count="1359" meta:non-whitespace-character-count="1161"/>
    <meta:generator>LibreOffice/7.3.7.2$Linux_X86_64 LibreOffice_project/30$Build-2</meta:generator>
  </office:meta>
</office:document-meta>
</file>