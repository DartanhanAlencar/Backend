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# Projeto AlunoOnline API</text:h>
      <text:p text:style-name="Text_20_body"/>
      <text:p text:style-name="Text_20_body">### Arquitetura das Pastas</text:p>
      <text:p text:style-name="Text_20_body"/>
      <text:p text:style-name="Text_20_body">- **controller**: Camada responsável por receber as requisições HTTP, validar os dados e encaminhá-los para a camada de serviço. Aqui estão implementados os endpoints REST da aplicação.</text:p>
      <text:p text:style-name="Text_20_body">- **service**: Contém a lógica de negócios. Os serviços fazem o intermédio entre os controladores e o repositório de dados.</text:p>
      <text:p text:style-name="Text_20_body">- **model**: Define as entidades que representam as tabelas do banco de dados.</text:p>
      <text:p text:style-name="Text_20_body">- **dtos**: Contém os objetos de transferência de dados (DTOs), usados para trafegar informações entre o cliente e a API de forma controlada.</text:p>
      <text:p text:style-name="Text_20_body">- **repository**: Interface para a comunicação com o banco de dados, geralmente utilizando Spring Data JPA.</text:p>
      <text:p text:style-name="Text_20_body">- **enums**: Contém as definições de tipos enumerados, usados para representar valores constantes em regras de negócio ou atributos das entidades, como status, tipos de usuário, ou níveis de acesso.</text:p>
      <text:p text:style-name="Text_20_body">## Classe Principal: `AlunoOnlineApplication.java`</text:p>
      <text:p text:style-name="Text_20_body">A classe `AlunoOnlineApplication.java` é o ponto de entrada da aplicação. Ela desempenha funções essenciais para a inicialização e execução correta do sistema:</text:p>
      <text:p text:style-name="Text_20_body"/>
      <text:p text:style-name="Text_20_body">1. **Configura o Spring Boot** <text:s/></text:p>
      <text:p text:style-name="Text_20_body"><text:s text:c="3"/>Utiliza a anotação `@SpringBootApplication`, que encapsula funcionalidades como:</text:p>
      <text:p text:style-name="Text_20_body"><text:s text:c="3"/>- Escaneamento de componentes.</text:p>
      <text:p text:style-name="Text_20_body"><text:s text:c="3"/>- Configuração automática.</text:p>
      <text:p text:style-name="Text_20_body"><text:s text:c="3"/>- Integração com o contexto da aplicação.</text:p>
      <text:p text:style-name="Text_20_body"/>
      <text:p text:style-name="Text_20_body">2. **Inicializa e executa a aplicação** <text:s/></text:p>
      <text:p text:style-name="Text_20_body"><text:s text:c="3"/>O método `main` invoca `SpringApplication.run()`, que:</text:p>
      <text:p text:style-name="Text_20_body"><text:s text:c="3"/>- Carrega o contexto do Spring.</text:p>
      <text:p text:style-name="Text_20_body"><text:s text:c="3"/>- Inicia o servidor embutido.</text:p>
      <text:p text:style-name="Text_20_body"><text:s text:c="3"/>- Prepara a aplicação para receber requisições.</text:p>
      <text:p text:style-name="Text_20_body"/>
      <text:p text:style-name="Text_20_body"><text:soft-page-break/>3. **Gerencia os componentes da aplicação** <text:s/></text:p>
      <text:p text:style-name="Text_20_body"><text:s text:c="3"/>Garante que todos os componentes, como controladores, serviços e repositórios, sejam:</text:p>
      <text:p text:style-name="Text_20_body"><text:s text:c="3"/>- Registrados no contêiner do Spring.</text:p>
      <text:p text:style-name="Text_20_body"><text:s text:c="3"/>- Gerenciados adequadamente com injeção de dependências e ciclo de vida configurado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3:47:32.623701493</meta:creation-date>
    <dc:date>2024-11-26T14:52:49.401493363</dc:date>
    <meta:editing-duration>PT9M3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255" meta:character-count="1787" meta:non-whitespace-character-count="1517"/>
  </office:meta>
</office:document-meta>
</file>